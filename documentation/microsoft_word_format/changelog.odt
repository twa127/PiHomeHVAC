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2">
      <style:paragraph-properties fo:break-before="page"/>
    </style:style>
    <style:style style:name="P19"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3105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50526</text:p>
          </table:table-cell>
        </table:table-row>
      </table:table>
      <text:p text:style-name="Standard"/>
      <text:h text:style-name="Heading_20_2" text:outline-level="2">Last Update</text:h>
      <text:list xml:id="list8740053865306044587" text:style-name="WWNum33">
        <text:list-item>
          <text:p text:style-name="P16">Commit #554 – Bug Fix - 'zone.php' – When editing zone, screen not displaying multiple sensors correctly.</text:p>
        </text:list-item>
        <text:list-item>
          <text:p text:style-name="P16">Commit #554 – Bug Fix – 'controller.py' – summer disable schedules not showing correctly.</text:p>
        </text:list-item>
        <text:list-item>
          <text:p text:style-name="P16">Commit #554 Update – 'db.php' and 'gateway.py' – allow 'anonymous' connection to MQTT broker. </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row>
          <table:table-cell table:style-name="Table53.A2" office:value-type="float" office:value="45990">
            <text:p text:style-name="P4">31/05/26</text:p>
          </table:table-cell>
          <table:table-cell table:style-name="Table53.A2" office:value-type="float" office:value="3.15">
            <text:p text:style-name="P4">3.23</text:p>
          </table:table-cell>
          <table:table-cell table:style-name="Table53.A2" office:value-type="float" office:value="291125">
            <text:p text:style-name="P4">31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zone.php' – When editing zone, screen not displaying multiple sensors correctly.</text:p>
            <text:p text:style-name="P11">Bug Fix – 'controller.py' – summer disable schedules not showing correctly.</text:p>
            <text:p text:style-name="P11">Update – 'db.php' and 'gateway.py' – allow 'anonymous' connection to MQTT broker.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3</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5-31T12:49:30.42</dc:date>
    <meta:print-date>2024-04-17T07:07:00Z</meta:print-date>
    <meta:editing-cycles>151</meta:editing-cycles>
    <meta:editing-duration>P9DT5H55M46S</meta:editing-duration>
    <meta:document-statistic meta:table-count="53" meta:image-count="0" meta:object-count="0" meta:page-count="55" meta:paragraph-count="3278" meta:word-count="13039" meta:character-count="82541"/>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