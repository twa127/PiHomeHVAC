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list-style-name="WWNum33"/>
    <style:style style:name="P16" style:family="paragraph" style:parent-style-name="Standard">
      <style:text-properties style:font-name="Times New Roman1" fo:font-size="12pt"/>
    </style:style>
    <style:style style:name="P17" style:family="paragraph" style:parent-style-name="Standard" style:list-style-name="WWNum33">
      <style:text-properties style:font-name="Times New Roman1" fo:font-size="12pt"/>
    </style:style>
    <style:style style:name="P18" style:family="paragraph" style:parent-style-name="Text_20_body">
      <style:paragraph-properties fo:break-before="page"/>
    </style:style>
    <style:style style:name="P19" style:family="paragraph" style:parent-style-name="Heading_20_1" style:master-page-name="MPF0">
      <style:paragraph-properties style:page-number="auto" fo:break-before="page"/>
    </style:style>
    <style:style style:name="P20"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style:style style:name="T5" style:family="text">
      <style:text-properties style:font-name="Symbol1" fo:font-size="12pt"/>
    </style:style>
    <style:style style:name="T6"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0505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50526</text:p>
          </table:table-cell>
        </table:table-row>
      </table:table>
      <text:p text:style-name="Standard"/>
      <text:h text:style-name="Heading_20_2" text:outline-level="2">Last Update</text:h>
      <text:list xml:id="list559872717186360209" text:style-name="WWNum33">
        <text:list-item>
          <text:p text:style-name="P17">Commit #551 – 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list-item>
        <text:list-item>
          <text:p text:style-name="P17">Commit #551 – 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list-item>
        <text:list-item>
          <text:p text:style-name="P17">Commit #551 – 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list-item>
        <text:list-item>
          <text:p text:style-name="P15"><text:span text:style-name="T6">Commit #551 – New Feature – New APIs –</text:span><text:span text:style-name="T5"> </text:span>modeSet.php, getZoneData.php, getFrostStatus.php, getRelayState.php, getLiveTemp.php, awaySet.php. SummerSet.php.</text:p>
        </text:list-item>
        <text:list-item>
          <text:p text:style-name="P15"><text:span text:style-name="T6">Commit #551 – Update – Improve database update synchronisation, 'gateway.py, 'controller.py', db_cleanup.py' and 'gpio_ds18b20.py'.</text:span></text:p>
        </text:list-item>
      </text:list>
      <text:h text:style-name="P20"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5-06T13:53:53.04</dc:date>
    <meta:print-date>2024-04-17T07:07:00Z</meta:print-date>
    <meta:editing-cycles>148</meta:editing-cycles>
    <meta:editing-duration>P9DT3H28M38S</meta:editing-duration>
    <meta:document-statistic meta:table-count="52" meta:image-count="0" meta:object-count="0" meta:page-count="54" meta:paragraph-count="3253" meta:word-count="13111" meta:character-count="83244"/>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