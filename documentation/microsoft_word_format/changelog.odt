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2">
      <style:paragraph-properties fo:break-before="page"/>
    </style:style>
    <style:style style:name="P19"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0206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20626</text:p>
          </table:table-cell>
        </table:table-row>
      </table:table>
      <text:p text:style-name="Standard"/>
      <text:h text:style-name="Heading_20_2" text:outline-level="2">Last Update</text:h>
      <text:list xml:id="list7940281831184392047" text:style-name="WWNum33">
        <text:list-item>
          <text:p text:style-name="P16">Commit #555 – New Feature – 'pvvx_ble_mqtt.py', 'check_pvvx_bridge.php' and update to table 'Jobs'– Additional support for 'Xiaomi Mijia Thermometer 2'. Previously support through the use a an ESP32 Bluetooth gateway, this feature enables connection using the Raspberry Pi's Bluetooth adapter, providing a simplified solution.</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row>
          <table:table-cell table:style-name="Table53.A2" office:value-type="float" office:value="45990">
            <text:p text:style-name="P4">18/05/26</text:p>
          </table:table-cell>
          <table:table-cell table:style-name="Table53.A2" office:value-type="float" office:value="3.15">
            <text:p text:style-name="P4">3.23</text:p>
          </table:table-cell>
          <table:table-cell table:style-name="Table53.A2" office:value-type="float" office:value="291125">
            <text:p text:style-name="P4">18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mode1.php' – Settings/System Configuration/Hot Water Comp not detecting 'Hot Water'zone.</text:p>
            <text:p text:style-name="P11">Bug Fix – 'controller.py' – disable any running schedules when NOT in Timer Mode.</text:p>
          </table:table-cell>
        </table:table-row>
        <table:table-row>
          <table:table-cell table:style-name="Table53.A2" office:value-type="float" office:value="45990">
            <text:p text:style-name="P4">31/05/26</text:p>
          </table:table-cell>
          <table:table-cell table:style-name="Table53.A2" office:value-type="float" office:value="3.15">
            <text:p text:style-name="P4">3.23</text:p>
          </table:table-cell>
          <table:table-cell table:style-name="Table53.A2" office:value-type="float" office:value="291125">
            <text:p text:style-name="P4">31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zone.php' – When editing zone, screen not displaying multiple sensors correctly.</text:p>
            <text:p text:style-name="P11">Bug Fix – 'controller.py' – summer disable schedules not showing correctly.</text:p>
            <text:p text:style-name="P11">Update – 'db.php' and 'gateway.py' – allow 'anonymous' connection to MQTT broker. </text:p>
          </table:table-cell>
        </table:table-row>
        <table:table-row>
          <table:table-cell table:style-name="Table53.A2" office:value-type="float" office:value="45990">
            <text:p text:style-name="P4">02/06/26</text:p>
          </table:table-cell>
          <table:table-cell table:style-name="Table53.A2" office:value-type="float" office:value="3.15">
            <text:p text:style-name="P4">3.23</text:p>
          </table:table-cell>
          <table:table-cell table:style-name="Table53.A2" office:value-type="float" office:value="291125">
            <text:p text:style-name="P4">020626</text:p>
          </table:table-cell>
          <table:table-cell table:style-name="Table53.A2" office:value-type="float" office:value="1">
            <text:p text:style-name="P4">1.0</text:p>
          </table:table-cell>
          <table:table-cell table:style-name="Table53.A2" office:value-type="float" office:value="10126">
            <text:p text:style-name="P4">020626</text:p>
          </table:table-cell>
          <table:table-cell table:style-name="Table53.F2" office:value-type="string">
            <text:p text:style-name="P11">New Feature – 'pvvx_ble_mqtt.py', 'check_pvvx_bridge.php' and update to table 'Jobs'– Additional support for 'Xiaomi Mijia Thermometer 2'. Previously support through the use a an ESP32 Bluetooth gateway, this feature enables connection using the Raspberry Pi's Bluetooth adapter, providing a simplified solu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3</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6-02T15:45:24.61</dc:date>
    <meta:print-date>2024-04-17T07:07:00Z</meta:print-date>
    <meta:editing-cycles>152</meta:editing-cycles>
    <meta:editing-duration>P9DT6H4M55S</meta:editing-duration>
    <meta:document-statistic meta:table-count="53" meta:image-count="0" meta:object-count="0" meta:page-count="55" meta:paragraph-count="3282" meta:word-count="13081" meta:character-count="82915"/>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