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52" style:family="table">
      <style:table-properties style:width="15.907cm" fo:margin-left="0cm" fo:break-before="page" table:align="left"/>
    </style:style>
    <style:style style:name="Table52.A" style:family="table-column">
      <style:table-column-properties style:column-width="2.401cm"/>
    </style:style>
    <style:style style:name="Table52.B" style:family="table-column">
      <style:table-column-properties style:column-width="1.3cm"/>
    </style:style>
    <style:style style:name="Table52.C" style:family="table-column">
      <style:table-column-properties style:column-width="1.799cm"/>
    </style:style>
    <style:style style:name="Table52.E" style:family="table-column">
      <style:table-column-properties style:column-width="1.7cm"/>
    </style:style>
    <style:style style:name="Table52.F" style:family="table-column">
      <style:table-column-properties style:column-width="7.407cm"/>
    </style:style>
    <style:style style:name="Table52.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2.F1" style:family="table-cell">
      <style:table-cell-properties fo:padding-left="0.191cm" fo:padding-right="0.191cm" fo:padding-top="0cm" fo:padding-bottom="0cm" fo:border="0.018cm solid #00000a" style:writing-mode="lr-tb"/>
    </style:style>
    <style:style style:name="Table52.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2.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3" style:family="table">
      <style:table-properties style:width="15.907cm" fo:margin-left="0cm" fo:break-before="page" table:align="left"/>
    </style:style>
    <style:style style:name="Table53.A" style:family="table-column">
      <style:table-column-properties style:column-width="2.401cm"/>
    </style:style>
    <style:style style:name="Table53.B" style:family="table-column">
      <style:table-column-properties style:column-width="1.3cm"/>
    </style:style>
    <style:style style:name="Table53.C" style:family="table-column">
      <style:table-column-properties style:column-width="1.799cm"/>
    </style:style>
    <style:style style:name="Table53.E" style:family="table-column">
      <style:table-column-properties style:column-width="1.7cm"/>
    </style:style>
    <style:style style:name="Table53.F" style:family="table-column">
      <style:table-column-properties style:column-width="7.407cm"/>
    </style:style>
    <style:style style:name="Table53.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3.F1" style:family="table-cell">
      <style:table-cell-properties fo:padding-left="0.191cm" fo:padding-right="0.191cm" fo:padding-top="0cm" fo:padding-bottom="0cm" fo:border="0.018cm solid #00000a" style:writing-mode="lr-tb"/>
    </style:style>
    <style:style style:name="Table53.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3.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style>
    <style:style style:name="P18" style:family="paragraph" style:parent-style-name="Heading_20_1" style:master-page-name="MPF0">
      <style:paragraph-properties style:page-number="auto" fo:break-before="page"/>
    </style:style>
    <style:style style:name="P19"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style:font-name="Symbol1"/>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3</text:p>
          </table:table-cell>
        </table:table-row>
        <table:table-row>
          <table:table-cell table:style-name="Table1.A1" office:value-type="string">
            <text:p text:style-name="P2">Current Build</text:p>
          </table:table-cell>
          <table:table-cell table:style-name="Table1.B1" office:value-type="float" office:value="70126">
            <text:p text:style-name="P2">1805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50526</text:p>
          </table:table-cell>
        </table:table-row>
      </table:table>
      <text:p text:style-name="Standard"/>
      <text:h text:style-name="Heading_20_2" text:outline-level="2">Last Update</text:h>
      <text:list xml:id="list5461638446740167403" text:style-name="WWNum33">
        <text:list-item>
          <text:p text:style-name="P16">Commit #553 – Bug Fix - 'mode1.php' – Settings/System Configuration/Hot Water Comp not detecting 'Hot Water'zone.</text:p>
        </text:list-item>
        <text:list-item>
          <text:p text:style-name="P16">Commit #553 – Bug Fix – 'controller.py' – disable any running schedules when NOT in Timer Mode. </text:p>
        </text:list-item>
      </text:list>
      <text:p text:style-name="P11"/>
      <text:h text:style-name="P19"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row>
          <table:table-cell table:style-name="Table51.A3" office:value-type="float" office:value="45990">
            <text:p text:style-name="P4">31/03/26</text:p>
          </table:table-cell>
          <table:table-cell table:style-name="Table51.A3" office:value-type="float" office:value="3.15">
            <text:p text:style-name="P4">3.22</text:p>
          </table:table-cell>
          <table:table-cell table:style-name="Table51.A3" office:value-type="float" office:value="291125">
            <text:p text:style-name="P4">310326</text:p>
          </table:table-cell>
          <table:table-cell table:style-name="Table51.A3" office:value-type="float" office:value="1">
            <text:p text:style-name="P4">1.0</text:p>
          </table:table-cell>
          <table:table-cell table:style-name="Table51.A3" office:value-type="float" office:value="10126">
            <text:p text:style-name="P4">310326</text:p>
          </table:table-cell>
          <table:table-cell table:style-name="Table51.F2" office:value-type="string">
            <text:p text:style-name="P11">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p text:style-name="P11"><text:s/>New Feature – 'Show Disabled Running Schedule Icon' – 'controller.py', 'homelist.php' and 'ajax_fetch_data.php' – display a white X in a blue circle icon in the lower right hand corner of a zone tile when a schedule which should be currently running, has been disabled.</text:p>
          </table:table-cell>
        </table:table-row>
        <table:table-row>
          <table:table-cell table:style-name="Table51.A2" office:value-type="float" office:value="45990">
            <text:p text:style-name="P4">01/04/26</text:p>
          </table:table-cell>
          <table:table-cell table:style-name="Table51.A2" office:value-type="float" office:value="3.15">
            <text:p text:style-name="P4">3.22</text:p>
          </table:table-cell>
          <table:table-cell table:style-name="Table51.A2" office:value-type="float" office:value="291125">
            <text:p text:style-name="P4">010426</text:p>
          </table:table-cell>
          <table:table-cell table:style-name="Table51.A2" office:value-type="float" office:value="1">
            <text:p text:style-name="P4">1.0</text:p>
          </table:table-cell>
          <table:table-cell table:style-name="Table51.A2" office:value-type="float" office:value="10126">
            <text:p text:style-name="P4">010426</text:p>
          </table:table-cell>
          <table:table-cell table:style-name="Table51.F2" office:value-type="string">
            <text:p text:style-name="P11">Update – 'Disabled Schedule Icon' – new column 'show_disabled' in table 'schedule_daily_time', 'controller.py' and 'scheduling.php' – for Zone type schedules tick box option to enable/disable the display a white X in a blue circle icon in the lower right hand corner of a zone tile when a schedule which should be currently running, has been disabled. The default is enabled.</text:p>
          </table:table-cell>
        </table:table-row>
      </table:table>
      <text:p text:style-name="Text_20_body"/>
      <table:table table:name="Table52" table:style-name="Table52">
        <table:table-column table:style-name="Table52.A"/>
        <table:table-column table:style-name="Table52.B"/>
        <table:table-column table:style-name="Table52.C"/>
        <table:table-column table:style-name="Table52.B"/>
        <table:table-column table:style-name="Table52.E"/>
        <table:table-column table:style-name="Table52.F"/>
        <table:table-header-rows>
          <table:table-row>
            <table:table-cell table:style-name="Table52.A1" office:value-type="string">
              <text:p text:style-name="P2">Date</text:p>
            </table:table-cell>
            <table:table-cell table:style-name="Table52.A1" office:value-type="string">
              <text:p text:style-name="P2">Ver</text:p>
            </table:table-cell>
            <table:table-cell table:style-name="Table52.A1" office:value-type="string">
              <text:p text:style-name="P2">Build</text:p>
            </table:table-cell>
            <table:table-cell table:style-name="Table52.A1" office:value-type="string">
              <text:p text:style-name="P2">DB Ver</text:p>
            </table:table-cell>
            <table:table-cell table:style-name="Table52.A1" office:value-type="string">
              <text:p text:style-name="P2">DB Build</text:p>
            </table:table-cell>
            <table:table-cell table:style-name="Table52.F1" office:value-type="string">
              <text:p text:style-name="P2">ChangeLog</text:p>
            </table:table-cell>
          </table:table-row>
        </table:table-header-rows>
        <table:table-row>
          <table:table-cell table:style-name="Table52.A2" office:value-type="float" office:value="45990">
            <text:p text:style-name="P4">05/05/26</text:p>
          </table:table-cell>
          <table:table-cell table:style-name="Table52.A2" office:value-type="float" office:value="3.15">
            <text:p text:style-name="P4">3.23</text:p>
          </table:table-cell>
          <table:table-cell table:style-name="Table52.A2" office:value-type="float" office:value="291125">
            <text:p text:style-name="P4">050526</text:p>
          </table:table-cell>
          <table:table-cell table:style-name="Table52.A2" office:value-type="float" office:value="1">
            <text:p text:style-name="P4">1.0</text:p>
          </table:table-cell>
          <table:table-cell table:style-name="Table52.A2" office:value-type="float" office:value="10126">
            <text:p text:style-name="P4">050526</text:p>
          </table:table-cell>
          <table:table-cell table:style-name="Table52.F2" office:value-type="string">
            <text:p text:style-name="P11">New Feature – 'Return to Home Page' – new column 'page_timeout' in table 'system', 'settings.php', 'schedule.php' , 'onetouch.php', 'db.php', 'model.php', 'request.js' and language files <text:s text:c="3"/>– if the system is left displaying any Settings menu screen, the Schedule list screen or the One Touch screen for longer than a configurable timeout period, then the display will return to the Home Screen. The timeout can be configured from the 'Settings/system Maintenance/Page Refresh' menu option, selecting a value of '0' will disable the timeout. The default is 60 second timeout.</text:p>
            <text:p text:style-name="P11">New Feature – 'Temperature Delta' – “settings.php', settingslist.php', 'model.php', 'ajax_fetch_data.php and language files – new menu option 'Settings/System Status/Temp Delta', to display the Max, Min and Delta values by either Zone or Sensor over the preceding one or twenty four hour time interval. </text:p>
            <text:p text:style-name="P11">New Feature – 'Disable schedules during summer months' – new table 'summer', new column 'disable_in_summer in table 'schedule_daily_time', 'controller.py', 'homelist.php', 'onetouch.php'. 'scheduling.php', 'model.php', 'settingslist.php', 'ajax_fetch_data.php', 'db.php', 'request.js', 'functions.php' and language files – disable selected schedules during a set period of time, popup to define the period and a 'OneTouch' button to enable/disable the feature.</text:p>
            <text:p text:style-name="P11">New Feature – New APIs –<text:span text:style-name="T4"> </text:span>modeSet.php, getZoneData.php, getFrostStatus.php, getRelayState.php, getLiveTemp.php, awaySet.php. SummerSet.php.</text:p>
          </table:table-cell>
        </table:table-row>
      </table:table>
      <text:p text:style-name="Text_20_body"/>
      <table:table table:name="Table53" table:style-name="Table53">
        <table:table-column table:style-name="Table53.A"/>
        <table:table-column table:style-name="Table53.B"/>
        <table:table-column table:style-name="Table53.C"/>
        <table:table-column table:style-name="Table53.B"/>
        <table:table-column table:style-name="Table53.E"/>
        <table:table-column table:style-name="Table53.F"/>
        <table:table-header-rows>
          <table:table-row>
            <table:table-cell table:style-name="Table53.A1" office:value-type="string">
              <text:p text:style-name="P2">Date</text:p>
            </table:table-cell>
            <table:table-cell table:style-name="Table53.A1" office:value-type="string">
              <text:p text:style-name="P2">Ver</text:p>
            </table:table-cell>
            <table:table-cell table:style-name="Table53.A1" office:value-type="string">
              <text:p text:style-name="P2">Build</text:p>
            </table:table-cell>
            <table:table-cell table:style-name="Table53.A1" office:value-type="string">
              <text:p text:style-name="P2">DB Ver</text:p>
            </table:table-cell>
            <table:table-cell table:style-name="Table53.A1" office:value-type="string">
              <text:p text:style-name="P2">DB Build</text:p>
            </table:table-cell>
            <table:table-cell table:style-name="Table53.F1" office:value-type="string">
              <text:p text:style-name="P2">ChangeLog</text:p>
            </table:table-cell>
          </table:table-row>
        </table:table-header-rows>
        <table:table-row>
          <table:table-cell table:style-name="Table53.A2" office:value-type="float" office:value="45990">
            <text:p text:style-name="P4">12/05/26</text:p>
          </table:table-cell>
          <table:table-cell table:style-name="Table53.A2" office:value-type="float" office:value="3.15">
            <text:p text:style-name="P4">3.23</text:p>
          </table:table-cell>
          <table:table-cell table:style-name="Table53.A2" office:value-type="float" office:value="291125">
            <text:p text:style-name="P4">12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request.js', 'db.php' and 'mode.php' – avoid resources issue when clicking on 'Mode', 'Away' and 'Summer Mode' buttons.</text:p>
          </table:table-cell>
        </table:table-row>
        <table:table-row>
          <table:table-cell table:style-name="Table53.A2" office:value-type="float" office:value="45990">
            <text:p text:style-name="P4">18/05/26</text:p>
          </table:table-cell>
          <table:table-cell table:style-name="Table53.A2" office:value-type="float" office:value="3.15">
            <text:p text:style-name="P4">3.23</text:p>
          </table:table-cell>
          <table:table-cell table:style-name="Table53.A2" office:value-type="float" office:value="291125">
            <text:p text:style-name="P4">18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mode1.php' – Settings/System Configuration/Hot Water Comp not detecting 'Hot Water'zone.</text:p>
            <text:p text:style-name="P11">Bug Fix – 'controller.py' – disable any running schedules when NOT in Timer Mod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54</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5-18T17:57:27.75</dc:date>
    <meta:print-date>2024-04-17T07:07:00Z</meta:print-date>
    <meta:editing-cycles>150</meta:editing-cycles>
    <meta:editing-duration>P9DT3H42M56S</meta:editing-duration>
    <meta:document-statistic meta:table-count="53" meta:image-count="0" meta:object-count="0" meta:page-count="55" meta:paragraph-count="3269" meta:word-count="12984" meta:character-count="82186"/>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