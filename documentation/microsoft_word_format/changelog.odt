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4" style:family="table">
      <style:table-properties style:width="15.907cm" fo:margin-left="0cm" fo:break-before="page" table:align="left"/>
    </style:style>
    <style:style style:name="Table54.A" style:family="table-column">
      <style:table-column-properties style:column-width="2.401cm"/>
    </style:style>
    <style:style style:name="Table54.B" style:family="table-column">
      <style:table-column-properties style:column-width="1.3cm"/>
    </style:style>
    <style:style style:name="Table54.C" style:family="table-column">
      <style:table-column-properties style:column-width="1.799cm"/>
    </style:style>
    <style:style style:name="Table54.E" style:family="table-column">
      <style:table-column-properties style:column-width="1.7cm"/>
    </style:style>
    <style:style style:name="Table54.F" style:family="table-column">
      <style:table-column-properties style:column-width="7.407cm"/>
    </style:style>
    <style:style style:name="Table54.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4.F1" style:family="table-cell">
      <style:table-cell-properties fo:padding-left="0.191cm" fo:padding-right="0.191cm" fo:padding-top="0cm" fo:padding-bottom="0cm" fo:border="0.018cm solid #00000a" style:writing-mode="lr-tb"/>
    </style:style>
    <style:style style:name="Table54.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4.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1" style:master-page-name="MPF0">
      <style:paragraph-properties style:page-number="auto" fo:break-before="page"/>
    </style:style>
    <style:style style:name="P19"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2006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280626</text:p>
          </table:table-cell>
        </table:table-row>
      </table:table>
      <text:p text:style-name="Standard"/>
      <text:h text:style-name="Heading_20_2" text:outline-level="2">Last Update</text:h>
      <text:list xml:id="list1006261408704878804" text:style-name="WWNum33">
        <text:list-item>
          <text:p text:style-name="P16">Commit #558 – Bug Fix – 'controller.py'– Ensure 'Summer Mode' set when zone goes over temperature. 'model.php' and language files – correct display of title for 'Summer Mode' documentation and in 'zone.php'. 'getOutsideTemperatureRTI.php'– fix dor delta values. </text:p>
        </text:list-item>
      </text:list>
      <text:p text:style-name="P11"/>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row>
          <table:table-cell table:style-name="Table53.A2" office:value-type="float" office:value="45990">
            <text:p text:style-name="P4">31/05/26</text:p>
          </table:table-cell>
          <table:table-cell table:style-name="Table53.A2" office:value-type="float" office:value="3.15">
            <text:p text:style-name="P4">3.23</text:p>
          </table:table-cell>
          <table:table-cell table:style-name="Table53.A2" office:value-type="float" office:value="291125">
            <text:p text:style-name="P4">31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zone.php' – When editing zone, screen not displaying multiple sensors correctly.</text:p>
            <text:p text:style-name="P11">Bug Fix – 'controller.py' – summer disable schedules not showing correctly.</text:p>
            <text:p text:style-name="P11">Update – 'db.php' and 'gateway.py' – allow 'anonymous' connection to MQTT broker. </text:p>
          </table:table-cell>
        </table:table-row>
        <table:table-row>
          <table:table-cell table:style-name="Table53.A2" office:value-type="float" office:value="45990">
            <text:p text:style-name="P4">02/06/26</text:p>
          </table:table-cell>
          <table:table-cell table:style-name="Table53.A2" office:value-type="float" office:value="3.15">
            <text:p text:style-name="P4">3.23</text:p>
          </table:table-cell>
          <table:table-cell table:style-name="Table53.A2" office:value-type="float" office:value="291125">
            <text:p text:style-name="P4">020626</text:p>
          </table:table-cell>
          <table:table-cell table:style-name="Table53.A2" office:value-type="float" office:value="1">
            <text:p text:style-name="P4">1.0</text:p>
          </table:table-cell>
          <table:table-cell table:style-name="Table53.A2" office:value-type="float" office:value="10126">
            <text:p text:style-name="P4">020626</text:p>
          </table:table-cell>
          <table:table-cell table:style-name="Table53.F2" office:value-type="string">
            <text:p text:style-name="P11">New Feature – 'pvvx_ble_mqtt.py', 'check_pvvx_bridge.php' and update to table 'Jobs'– Additional support for 'Xiaomi Mijia Thermometer 2'. Previously support through the use a an ESP32 Bluetooth gateway, this feature enables connection using the Raspberry Pi's Bluetooth adapter, providing a simplified solution.</text:p>
          </table:table-cell>
        </table:table-row>
      </table:table>
      <text:p text:style-name="Text_20_body"/>
      <table:table table:name="Table54" table:style-name="Table54">
        <table:table-column table:style-name="Table54.A"/>
        <table:table-column table:style-name="Table54.B"/>
        <table:table-column table:style-name="Table54.C"/>
        <table:table-column table:style-name="Table54.B"/>
        <table:table-column table:style-name="Table54.E"/>
        <table:table-column table:style-name="Table54.F"/>
        <table:table-header-rows>
          <table:table-row>
            <table:table-cell table:style-name="Table54.A1" office:value-type="string">
              <text:p text:style-name="P2">Date</text:p>
            </table:table-cell>
            <table:table-cell table:style-name="Table54.A1" office:value-type="string">
              <text:p text:style-name="P2">Ver</text:p>
            </table:table-cell>
            <table:table-cell table:style-name="Table54.A1" office:value-type="string">
              <text:p text:style-name="P2">Build</text:p>
            </table:table-cell>
            <table:table-cell table:style-name="Table54.A1" office:value-type="string">
              <text:p text:style-name="P2">DB Ver</text:p>
            </table:table-cell>
            <table:table-cell table:style-name="Table54.A1" office:value-type="string">
              <text:p text:style-name="P2">DB Build</text:p>
            </table:table-cell>
            <table:table-cell table:style-name="Table54.F1" office:value-type="string">
              <text:p text:style-name="P2">ChangeLog</text:p>
            </table:table-cell>
          </table:table-row>
        </table:table-header-rows>
        <table:table-row>
          <table:table-cell table:style-name="Table54.A2" office:value-type="float" office:value="45990">
            <text:p text:style-name="P4">20/06/26</text:p>
          </table:table-cell>
          <table:table-cell table:style-name="Table54.A2" office:value-type="float" office:value="3.15">
            <text:p text:style-name="P4">3.23</text:p>
          </table:table-cell>
          <table:table-cell table:style-name="Table54.A2" office:value-type="float" office:value="291125">
            <text:p text:style-name="P4">200626</text:p>
          </table:table-cell>
          <table:table-cell table:style-name="Table54.A2" office:value-type="float" office:value="1">
            <text:p text:style-name="P4">1.0</text:p>
          </table:table-cell>
          <table:table-cell table:style-name="Table54.A2" office:value-type="float" office:value="10126">
            <text:p text:style-name="P4">020626</text:p>
          </table:table-cell>
          <table:table-cell table:style-name="Table54.F2" office:value-type="string">
            <text:p text:style-name="P11">Update – 'controller.py'– Only display over temperature indicator when a Zone is active, set Zone Mode to 0 when a Zone is inactive, even if over temperature.</text:p>
            <text:p text:style-name="P11">New Feature – 'getOutsideTemperatureRTI.php'– API to return the min, max, and last 1 hour delta values for the 'Weather Channel' outside temperature. Can also be used with a parameter 'sensorname' to return the values for any other sensor. </text:p>
            <text:p text:style-name="P11">Bug Fix – 'zone.php'– Ensure that Primary Sensor field remains empty after Zone Type re-selection. </text:p>
          </table:table-cell>
        </table:table-row>
        <table:table-row>
          <table:table-cell table:style-name="Table54.A2" office:value-type="float" office:value="45990">
            <text:p text:style-name="P4">28/06/26</text:p>
          </table:table-cell>
          <table:table-cell table:style-name="Table54.A2" office:value-type="float" office:value="3.15">
            <text:p text:style-name="P4">3.23</text:p>
          </table:table-cell>
          <table:table-cell table:style-name="Table54.A2" office:value-type="float" office:value="291125">
            <text:p text:style-name="P4">280626</text:p>
          </table:table-cell>
          <table:table-cell table:style-name="Table54.A2" office:value-type="float" office:value="1">
            <text:p text:style-name="P4">1.0</text:p>
          </table:table-cell>
          <table:table-cell table:style-name="Table54.A2" office:value-type="float" office:value="10126">
            <text:p text:style-name="P4">020626</text:p>
          </table:table-cell>
          <table:table-cell table:style-name="Table54.F2" office:value-type="string">
            <text:p text:style-name="P11">Bug Fix – 'controller.py'– Ensure 'Summer Mode' set when zone goes over temperature. 'model.php' and language files – correct display of title for 'Summer Mode' documentation and in 'zone.php'. 'getOutsideTemperatureRTI.php'– fix dor delta values.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6-28T15:40:00.95</dc:date>
    <meta:print-date>2024-04-17T07:07:00Z</meta:print-date>
    <meta:editing-cycles>155</meta:editing-cycles>
    <meta:editing-duration>P9DT6H24M42S</meta:editing-duration>
    <meta:document-statistic meta:table-count="54" meta:image-count="0" meta:object-count="0" meta:page-count="56" meta:paragraph-count="3302" meta:word-count="13206" meta:character-count="83685"/>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